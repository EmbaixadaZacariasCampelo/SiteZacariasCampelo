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b117" officeooo:paragraph-rsid="0011b117"/>
    </style:style>
    <style:style style:name="P2" style:family="paragraph" style:parent-style-name="Standard">
      <style:paragraph-properties fo:text-align="center" style:justify-single-word="false"/>
      <style:text-properties officeooo:rsid="0011b117" officeooo:paragraph-rsid="0011b117"/>
    </style:style>
    <style:style style:name="P3" style:family="paragraph" style:parent-style-name="Standard">
      <style:text-properties officeooo:rsid="0011fb80" officeooo:paragraph-rsid="0011b117"/>
    </style:style>
    <style:style style:name="P4" style:family="paragraph" style:parent-style-name="Standard">
      <style:text-properties officeooo:rsid="0011fb80" officeooo:paragraph-rsid="001373f7"/>
    </style:style>
    <style:style style:name="P5" style:family="paragraph" style:parent-style-name="Standard">
      <style:text-properties fo:font-weight="bold" officeooo:rsid="0011b117" officeooo:paragraph-rsid="0011b11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officeooo:rsid="0011b117" officeooo:paragraph-rsid="0011b117" style:font-size-asian="15pt" style:font-size-complex="15pt"/>
    </style:style>
    <style:style style:name="T1" style:family="text">
      <style:text-properties officeooo:rsid="0011fb80"/>
    </style:style>
    <style:style style:name="T2" style:family="text">
      <style:text-properties officeooo:rsid="001373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studos de Xadrez Embaixada Zacarias Campelo</text:p>
      <text:p text:style-name="P2"/>
      <text:p text:style-name="P2"/>
      <text:p text:style-name="P2">Roteiro de Estudo (Programação de Conteúdos)</text:p>
      <text:p text:style-name="P2"/>
      <text:p text:style-name="P1"/>
      <text:p text:style-name="P5">Módulo 1 (Xadrez Básico: Primeiro conceitos) </text:p>
      <text:p text:style-name="P1"/>
      <text:p text:style-name="P1">Aula 01 – <text:span text:style-name="T1">Sobre as aulas, </text:span>Tabuleiro</text:p>
      <text:p text:style-name="P1"/>
      <text:p text:style-name="P1">Aula 02 – Conceitos básicos (Dicionário) , Peças e seus valores</text:p>
      <text:p text:style-name="P1"><text:s/></text:p>
      <text:p text:style-name="P1">Aula 03 – Treino de Tática</text:p>
      <text:p text:style-name="P1"/>
      <text:p text:style-name="P1">Aula 04 – Conceitos de abertura</text:p>
      <text:p text:style-name="P1"/>
      <text:p text:style-name="P1">Aula 05 – Análise de uma partida </text:p>
      <text:p text:style-name="P1"/>
      <text:p text:style-name="P1"><text:s/></text:p>
      <text:p text:style-name="P5">Módulo 2 (Reconhecendo Padrões)</text:p>
      <text:p text:style-name="P1"/>
      <text:p text:style-name="P1">Aula 06 – Mates conhecidos</text:p>
      <text:p text:style-name="P1"/>
      <text:p text:style-name="P1">Aula 07 – Armadilhas Conhecidas</text:p>
      <text:p text:style-name="P1"/>
      <text:p text:style-name="P1">Aula 08 – Finais Conhecidos</text:p>
      <text:p text:style-name="P1"/>
      <text:p text:style-name="P1">Aula 09 – Análise de Partida</text:p>
      <text:p text:style-name="P3"/>
      <text:p text:style-name="P3"/>
      <text:p text:style-name="P4">Softwares utilizados: </text:p>
      <text:p text:style-name="P4">OBS Studio <text:s/></text:p>
      <text:p text:style-name="P4">Lichess // <text:span text:style-name="T2">Chess.com</text:span></text:p>
      <text:p text:style-name="P4"><text:span text:style-name="T2">G</text:span>ostaria de fazer um sistema de links como da wikipedia, Verificar anytype, obsidian, html (Markdonw), por hora utilizarei Power point (libreOffice Draw),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8T00:05:58.764731014</meta:creation-date>
    <meta:editing-duration>PT1M25S</meta:editing-duration>
    <meta:editing-cycles>2</meta:editing-cycles>
    <meta:generator>LibreOffice/24.2.7.2$Linux_X86_64 LibreOffice_project/420$Build-2</meta:generator>
    <dc:date>2026-07-18T00:17:33.278283075</dc:date>
    <meta:document-statistic meta:table-count="0" meta:image-count="0" meta:object-count="0" meta:page-count="1" meta:paragraph-count="19" meta:word-count="100" meta:character-count="675" meta:non-whitespace-character-count="575"/>
  </office:meta>
</office:document-meta>
</file>